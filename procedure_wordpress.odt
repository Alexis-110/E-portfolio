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Bahnschrift" svg:font-family="Bahnschrif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ans Serif Collection" svg:font-family="'Sans Serif Collection'" style:font-family-generic="swiss" style:font-pitch="variable"/>
  </office:font-face-decls>
  <office:automatic-styles>
    <style:style style:name="P1" style:family="paragraph" style:parent-style-name="Heading_20_2">
      <style:text-properties style:font-name="Bahnschrift"/>
    </style:style>
    <style:style style:name="P2" style:family="paragraph" style:parent-style-name="Text_20_body">
      <style:text-properties style:font-name="Bahnschrift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Bahnschrift"/>
    </style:style>
    <style:style style:name="P4" style:family="paragraph" style:parent-style-name="Preformatted_20_Text">
      <style:paragraph-properties fo:margin-top="0cm" fo:margin-bottom="0.247cm" style:contextual-spacing="false" fo:line-height="115%"/>
      <style:text-properties style:font-name="Sans Serif Collection"/>
    </style:style>
    <style:style style:name="P5" style:family="paragraph" style:parent-style-name="Horizontal_20_Line">
      <style:paragraph-properties fo:margin-top="0cm" fo:margin-bottom="0.247cm" style:contextual-spacing="false" fo:line-height="115%"/>
      <style:text-properties style:font-name="Bahnschrift" fo:background-color="#729fcf"/>
    </style:style>
    <style:style style:name="P6" style:family="paragraph" style:parent-style-name="Heading_20_2">
      <style:paragraph-properties fo:margin-top="0cm" fo:margin-bottom="0.247cm" style:contextual-spacing="false" fo:line-height="115%"/>
      <style:text-properties style:font-name="Bahnschrift"/>
    </style:style>
    <style:style style:name="P7" style:family="paragraph" style:parent-style-name="Text_20_body" style:list-style-name="L1">
      <style:text-properties style:font-name="Sans Serif Collection"/>
    </style:style>
    <style:style style:name="P8" style:family="paragraph" style:parent-style-name="Text_20_body" style:list-style-name="L1">
      <style:text-properties style:font-name="Bahnschrift"/>
    </style:style>
    <style:style style:name="P9" style:family="paragraph" style:parent-style-name="Horizontal_20_Line">
      <style:paragraph-properties fo:margin-top="0cm" fo:margin-bottom="0.247cm" style:contextual-spacing="false" fo:line-height="115%"/>
      <style:text-properties style:font-name="Bahnschrift"/>
    </style:style>
    <style:style style:name="P10" style:family="paragraph" style:parent-style-name="Heading_20_3">
      <style:paragraph-properties fo:margin-top="0cm" fo:margin-bottom="0.247cm" style:contextual-spacing="false" fo:line-height="115%"/>
      <style:text-properties style:font-name="Bahnschrift"/>
    </style:style>
    <style:style style:name="P11" style:family="paragraph" style:parent-style-name="Text_20_body">
      <style:text-properties style:font-name="Sans Serif Collection"/>
    </style:style>
    <style:style style:name="P12" style:family="paragraph" style:parent-style-name="Quotations">
      <style:paragraph-properties fo:margin-top="0cm" fo:margin-bottom="0.247cm" style:contextual-spacing="false" fo:line-height="115%"/>
      <style:text-properties style:font-name="Sans Serif Collection"/>
    </style:style>
    <style:style style:name="T1" style:family="text">
      <style:text-properties style:font-name="Bahnschrift" fo:background-color="#729fcf" loext:char-shading-value="0"/>
    </style:style>
    <style:style style:name="T2" style:family="text">
      <style:text-properties style:font-name="Bahnschrift" fo:font-weight="bold"/>
    </style:style>
    <style:style style:name="T3" style:family="text">
      <style:text-properties style:font-name="Bahnschrift"/>
    </style:style>
    <style:style style:name="T4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1. Mise à jour du système et installation de LAMP</text:h>
      <text:p text:style-name="P2">Tout d'abord, assurez-vous que votre index de paquets est à jour et installez les composants nécessaires.</text:p>
      <text:p text:style-name="P3">Bash</text:p>
      <text:p text:style-name="P4"><text:span text:style-name="Source_20_Text"><text:span text:style-name="T1">sudo apt update &amp;&amp; sudo apt upgrade -y</text:span></text:span></text:p>
      <text:p text:style-name="P4"><text:span text:style-name="Source_20_Text"><text:span text:style-name="T1">sudo apt install apache2 mariadb-server php libapache2-mod-php php-mysql php-curl php-gd php-mbstring php-xml php-xmlrpc php-soap php-intl php-zip -y</text:span></text:span></text:p>
      <text:p text:style-name="P5"/>
      <text:h text:style-name="P6" text:outline-level="2">2. Configuration de la base de données</text:h>
      <text:p text:style-name="P2">WordPress a besoin d'une base de données MySQL (ou MariaDB) pour stocker ses articles et réglages.</text:p>
      <text:list text:style-name="L1">
        <text:list-item>
          <text:p text:style-name="P7"><text:span text:style-name="T2">Sécurisez l'installation</text:span><text:span text:style-name="T3"> (facultatif mais recommandé) : </text:span><text:span text:style-name="Source_20_Text"><text:span text:style-name="T3">sudo mysql_secure_installation</text:span></text:span><text:span text:style-name="T3">.</text:span></text:p>
        </text:list-item>
        <text:list-item>
          <text:p text:style-name="P8"><text:span text:style-name="T4">Créez la base de données</text:span> :</text:p>
        </text:list-item>
      </text:list>
      <text:p text:style-name="P3">Bash</text:p>
      <text:p text:style-name="P4"><text:span text:style-name="Source_20_Text"><text:span text:style-name="T1">sudo mysql -u root -p</text:span></text:span></text:p>
      <text:p text:style-name="P2">Une fois dans l'invite MySQL, exécutez ces commandes :</text:p>
      <text:p text:style-name="P3">SQL</text:p>
      <text:p text:style-name="P4"><text:span text:style-name="Source_20_Text"><text:span text:style-name="T1">CREATE DATABASE wordpress DEFAULT CHARACTER SET utf8 COLLATE utf8_unicode_ci;</text:span></text:span></text:p>
      <text:p text:style-name="P4"><text:span text:style-name="Source_20_Text"><text:span text:style-name="T1">CREATE USER 'wp_user'@'localhost' IDENTIFIED BY 'votre_mot_de_passe';</text:span></text:span></text:p>
      <text:p text:style-name="P4"><text:span text:style-name="Source_20_Text"><text:span text:style-name="T1">GRANT ALL ON wordpress.* TO 'wp_user'@'localhost';</text:span></text:span></text:p>
      <text:p text:style-name="P4"><text:span text:style-name="Source_20_Text"><text:span text:style-name="T1">FLUSH PRIVILEGES;</text:span></text:span></text:p>
      <text:p text:style-name="P4"><text:span text:style-name="Source_20_Text"><text:span text:style-name="T1">EXIT;</text:span></text:span></text:p>
      <text:p text:style-name="P5"/>
      <text:h text:style-name="P6" text:outline-level="2">3. Téléchargement de WordPress</text:h>
      <text:p text:style-name="P2">Nous allons télécharger la dernière version directement depuis les serveurs officiels.</text:p>
      <text:p text:style-name="P3">Bash</text:p>
      <text:p text:style-name="P4"><text:span text:style-name="Source_20_Text"><text:span text:style-name="T1">cd /tmp</text:span></text:span></text:p>
      <text:p text:style-name="P4"><text:span text:style-name="Source_20_Text"><text:span text:style-name="T1">curl -O https://wordpress.org/latest.tar.gz</text:span></text:span></text:p>
      <text:p text:style-name="P4"><text:span text:style-name="Source_20_Text"><text:span text:style-name="T1">tar xzvf latest.tar.gz</text:span></text:span></text:p>
      <text:p text:style-name="P2">Copiez ensuite les fichiers vers le répertoire web d'Apache :</text:p>
      <text:p text:style-name="P3">Bash</text:p>
      <text:p text:style-name="P4"><text:soft-page-break/><text:span text:style-name="Source_20_Text"><text:span text:style-name="T1">sudo cp -a /tmp/wordpress/. /var/www/html/wordpress</text:span></text:span></text:p>
      <text:p text:style-name="P9"/>
      <text:h text:style-name="P6" text:outline-level="2">4. Configuration des droits et d'Apache</text:h>
      <text:p text:style-name="P2">Pour que WordPress puisse écrire des fichiers (pour les mises à jour ou les images), Apache doit posséder les droits sur le dossier.</text:p>
      <text:p text:style-name="P3">Bash</text:p>
      <text:p text:style-name="P4"><text:span text:style-name="Source_20_Text"><text:span text:style-name="T1">sudo chown -R www-data:www-data /var/www/html/wordpress</text:span></text:span></text:p>
      <text:p text:style-name="P4"><text:span text:style-name="Source_20_Text"><text:span text:style-name="T1">sudo find /var/www/html/wordpress/ -type d -exec chmod 750 {} \;</text:span></text:span></text:p>
      <text:p text:style-name="P4"><text:span text:style-name="Source_20_Text"><text:span text:style-name="T1">sudo find /var/www/html/wordpress/ -type f -exec chmod 640 {} \;</text:span></text:span></text:p>
      <text:p text:style-name="P5"/>
      <text:h text:style-name="P6" text:outline-level="2">5. Test du fonctionnement via la ligne de commande</text:h>
      <text:p text:style-name="P2">Pour vérifier que tout est bien en place sans quitter le terminal, nous pouvons utiliser deux méthodes :</text:p>
      <text:h text:style-name="P10" text:outline-level="3">A. Vérifier le statut des services</text:h>
      <text:p text:style-name="P3">Bash</text:p>
      <text:p text:style-name="P4"><text:span text:style-name="Source_20_Text"><text:span text:style-name="T1">systemctl status apache2</text:span></text:span></text:p>
      <text:p text:style-name="P4"><text:span text:style-name="Source_20_Text"><text:span text:style-name="T1">systemctl status mariadb</text:span></text:span></text:p>
      <text:h text:style-name="P10" text:outline-level="3">B. Tester la réponse HTTP (CURL)</text:h>
      <text:p text:style-name="P11"><text:span text:style-name="T3">Utilisez </text:span><text:span text:style-name="Source_20_Text"><text:span text:style-name="T3">curl</text:span></text:span><text:span text:style-name="T3"> pour voir si la page de configuration de WordPress répond correctement :</text:span></text:p>
      <text:p text:style-name="P3">Bash</text:p>
      <text:p text:style-name="P4"><text:span text:style-name="Source_20_Text"><text:span text:style-name="T1">curl -I http://localhost/wordpress/wp-admin/install.php</text:span></text:span></text:p>
      <text:p text:style-name="P12"><text:span text:style-name="T2">Résultat attendu :</text:span><text:span text:style-name="T3"> Vous devriez voir </text:span><text:span text:style-name="Source_20_Text"><text:span text:style-name="T3">HTTP/1.1 200 OK</text:span></text:span><text:span text:style-name="T3">. Cela confirme que le serveur PHP traite bien la page.</text:span></text:p>
      <text:h text:style-name="P10" text:outline-level="3">C. Test de rendu texte (Lynx)</text:h>
      <text:p text:style-name="P2">Si vous voulez "voir" le site en mode texte directement dans votre terminal :</text:p>
      <text:p text:style-name="P3">Bash</text:p>
      <text:p text:style-name="P4"><text:span text:style-name="Source_20_Text"><text:span text:style-name="T1">sudo apt install lynx -y</text:span></text:span></text:p>
      <text:p text:style-name="P4"><text:span text:style-name="Source_20_Text"><text:span text:style-name="T1">lynx http://localhost/wordpress</text:span></text:span></text:p>
      <text:p text:style-name="P9"/>
      <text:h text:style-name="P6" text:outline-level="2">Prochaine étape</text:h>
      <text:p text:style-name="P11"><text:span text:style-name="T3">Une fois ces vérifications faites, il ne vous reste plus qu'à ouvrir votre navigateur sur </text:span><text:span text:style-name="Source_20_Text"><text:span text:style-name="T3">http://votre_ip/wordpress</text:span></text:span><text:span text:style-name="T3"> pour finaliser l'installation graphique.</text:span></text:p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Bahnschrift" svg:font-family="Bahnschrif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ans Serif Collection" svg:font-family="'Sans Serif Collectio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8T11:31:53.478243400</meta:creation-date>
    <dc:date>2026-03-18T11:36:11.760619400</dc:date>
    <meta:editing-duration>PT4M16S</meta:editing-duration>
    <meta:editing-cycles>3</meta:editing-cycles>
    <meta:generator>LibreOffice/25.8.5.2$Windows_X86_64 LibreOffice_project/9c8b85f387cc00a89945a79c9e6239f32e450ac2</meta:generator>
    <meta:document-statistic meta:table-count="0" meta:image-count="0" meta:object-count="0" meta:page-count="3" meta:paragraph-count="51" meta:word-count="359" meta:character-count="2424" meta:non-whitespace-character-count="2118"/>
  </office:meta>
</office:document-meta>
</file>